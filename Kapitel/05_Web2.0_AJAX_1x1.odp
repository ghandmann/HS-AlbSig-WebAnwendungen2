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500000096D324E4EA.png" manifest:media-type="image/png"/>
  <manifest:file-entry manifest:full-path="Pictures/10000001000004B0000001A4B19CDD5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Code">
      <style:graphic-properties fo:min-height="4.927cm" fo:min-width="12.829cm" loext:decorative="false"/>
      <style:paragraph-properties style:writing-mode="lr-tb"/>
    </style:style>
    <style:style style:name="gr4" style:family="graphic" style:parent-style-name="Code">
      <style:graphic-properties fo:min-height="5.748cm" fo:min-width="20.953cm" loext:decorative="false"/>
      <style:paragraph-properties style:writing-mode="lr-tb"/>
    </style:style>
    <style:style style:name="gr5" style:family="graphic" style:parent-style-name="Code">
      <style:graphic-properties fo:min-height="4.927cm" fo:min-width="23.946cm" loext:decorative="false"/>
      <style:paragraph-properties style:writing-mode="lr-tb"/>
    </style:style>
    <style:style style:name="gr6" style:family="graphic" style:parent-style-name="Code">
      <style:graphic-properties fo:min-height="4.106cm" fo:min-width="23.518cm" loext:decorative="false"/>
      <style:paragraph-properties style:writing-mode="lr-tb"/>
    </style:style>
    <style:style style:name="gr7" style:family="graphic" style:parent-style-name="Code">
      <style:graphic-properties fo:min-height="6.569cm" fo:min-width="17.96cm" loext:decorative="false"/>
      <style:paragraph-properties style:writing-mode="lr-tb"/>
    </style:style>
    <style:style style:name="gr8" style:family="graphic" style:parent-style-name="Code">
      <style:graphic-properties fo:min-height="7.39cm" fo:min-width="26.906cm" loext:decorative="false"/>
      <style:paragraph-properties style:writing-mode="lr-tb"/>
    </style:style>
    <style:style style:name="gr9" style:family="graphic" style:parent-style-name="Code">
      <style:graphic-properties fo:min-height="11.056cm" fo:min-width="23.624cm" loext:decorative="false"/>
      <style:paragraph-properties style:writing-mode="lr-tb"/>
    </style:style>
    <style:style style:name="gr10" style:family="graphic" style:parent-style-name="Code">
      <style:graphic-properties fo:min-height="4.927cm" fo:min-width="26.511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95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2-title">
      <style:graphic-properties fo:min-height="1.747cm" loext:decorative="false"/>
      <style:paragraph-properties style:writing-mode="lr-tb"/>
    </style:style>
    <style:style style:name="pr5" style:family="presentation" style:parent-style-name="Midnightblue2-outline1">
      <style:graphic-properties fo:min-height="3.875cm" loext:decorative="false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-title">
      <style:graphic-properties fo:min-height="4.25cm" loext:decorative="false"/>
      <style:paragraph-properties style:writing-mode="lr-tb"/>
    </style:style>
    <style:style style:name="pr8" style:family="presentation" style:parent-style-name="Midnightblue-outline1">
      <style:graphic-properties fo:min-height="4.25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Midnightblue-title">
      <style:graphic-properties fo:min-height="1.1cm" loext:decorative="false"/>
      <style:paragraph-properties style:writing-mode="lr-tb"/>
    </style:style>
    <style:style style:name="pr11" style:family="presentation" style:parent-style-name="Midnightblue-outline1">
      <style:graphic-properties fo:min-height="12.175cm" loext:decorative="false"/>
      <style:paragraph-properties style:writing-mode="lr-tb"/>
    </style:style>
    <style:style style:name="pr12" style:family="presentation" style:parent-style-name="Midnightblue-notes">
      <style:graphic-properties draw:fill-color="#ffffff" draw:auto-grow-height="false" fo:min-height="13.364cm" loext:decorative="false"/>
      <style:paragraph-properties style:writing-mode="lr-tb"/>
    </style:style>
    <style:style style:name="pr13" style:family="presentation" style:parent-style-name="Midnightblue2-title">
      <style:graphic-properties fo:min-height="1.1cm" loext:decorative="false"/>
      <style:paragraph-properties style:writing-mode="lr-tb"/>
    </style:style>
    <style:style style:name="pr14" style:family="presentation" style:parent-style-name="Midnightblue2-outline1">
      <style:graphic-properties fo:min-height="12.175cm" loext:decorative="false"/>
      <style:paragraph-properties style:writing-mode="lr-tb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left" fo:text-indent="0cm" style:text-autospace="ideograph-alpha" style:punctuation-wrap="hanging" style:line-break="strict" loext:tab-stop-distance="0cm">
        <style:tab-stops/>
      </style:paragraph-properties>
      <style:text-properties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 loext:opacity="100%"/>
    </style:style>
    <style:style style:name="T5" style:family="text">
      <style:text-properties style:use-window-font-color="true" loext:opacity="0%"/>
    </style:style>
    <style:style style:name="T6" style:family="text">
      <style:text-properties style:font-name="Liberation Sans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ed1c24" loext:opacity="100%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font-name="DejaVu Sans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461cm" svg:x="1cm" svg:y="7.144cm" presentation:class="title" presentation:user-transformed="true">
          <draw:text-box>
            <text:p><text:span text:style-name="T1">Web2.0 AJAX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B19CDD5F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D324E4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ie das Web interaktiver wurd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Jeder Event triggert einen kompletten Page-Load</text:p>
                <text:list>
                  <text:list-item>
                    <text:p>Das vorhandene DOM wird zerstört</text:p>
                  </text:list-item>
                  <text:list-item>
                    <text:p>Request wird an den Server geschickt</text:p>
                  </text:list-item>
                  <text:list-item>
                    <text:p>Keine Aktionen möglich, während der Request läuft</text:p>
                  </text:list-item>
                  <text:list-item>
                    <text:p>Warten auf Response (meist auf leerer Seite)</text:p>
                  </text:list-item>
                </text:list>
              </text:list-item>
              <text:list-item>
                <text:p>Erst wenn die Response da ist, ist die Anwendung wieder nutzbar</text:p>
                <text:list>
                  <text:list-item>
                    <text:p>UI wird immer komplett neu gerendert</text:p>
                  </text:list-item>
                  <text:list-item>
                    <text:p>Server muss den App-State rekonstruieren (z.B. Sub-Menu)</text:p>
                  </text:list-item>
                  <text:list-item>
                    <text:p>Lange Wartzeit bei hoher Serverla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Zum Teil sind Workarounds notwendig</text:p>
                <text:list>
                  <text:list-item>
                    <text:p>Redirect-after-post um mehrfaches absenden von Formularen durch Neuladen zu vermeiden</text:p>
                  </text:list-item>
                </text:list>
              </text:list-item>
              <text:list-item>
                <text:p>Um Neuigkeiten zu sehen, muss immer alles neu gehol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AJAX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Asynchronous JavaScript and XML (AJAX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synchronous</text:p>
                <text:list>
                  <text:list-item>
                    <text:p>I/O Operation werden an das Betriebssystem delegiert</text:p>
                  </text:list-item>
                  <text:list-item>
                    <text:p>Der eigene Kontrollfluß läuft <text:span text:style-name="T3">sofort</text:span> weiter</text:p>
                  </text:list-item>
                  <text:list-item>
                    <text:p>Das Betriebssystem meldet zurück, wenn die Operation abgeschlossen ist</text:p>
                  </text:list-item>
                  <text:list-item>
                    <text:p>Beispiele: Boost Asio, AsyncIO, node.js</text:p>
                  </text:list-item>
                </text:list>
              </text:list-item>
              <text:list-item>
                <text:p>JavaScript</text:p>
                <text:list>
                  <text:list-item>
                    <text:p>Die verwendete Sprache</text:p>
                  </text:list-item>
                </text:list>
              </text:list-item>
              <text:list-item>
                <text:p>XML</text:p>
                <text:list>
                  <text:list-item>
                    <text:p>Tatsächlich kann alles via XHR transportiert werden, nicht nur XML (JSON, Bilder, Filme, HTML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Sequentielle vs. Asynchrone Programmieru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equentiell:</text:p>
                <text:list>
                  <text:list-item>
                    <text:p>Der Code wird Zeile für Zeile (bzw. Statement für Statement) von oben nach unten durchlaufen</text:p>
                  </text:list-item>
                </text:list>
              </text:list-item>
            </text:list>
          </draw:text-box>
        </draw:frame>
        <draw:frame draw:style-name="gr3" draw:layer="layout" svg:width="13.329cm" svg:height="5.177cm" svg:x="7.337cm" svg:y="7.665cm">
          <draw:text-box>
            <text:p>1: console.log("Hallo Welt!");<text:line-break/>2: console.log("Tschüss!");</text:p>
            <text:p/>
            <text:p>// Ausgabe:</text:p>
            <text:p>Hallo Welt!</text:p>
            <text:p>Tschüss!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equentielle vs. Asynchrone Programmieru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:</text:p>
                <text:list>
                  <text:list-item>
                    <text:p>Eine Aktion wird gestartet, der Kontrollfluss kehrt sofort zum Aufrufer zurück</text:p>
                  </text:list-item>
                  <text:list-item>
                    <text:p>Zu einem späteren Zeitpunkt wird dann die gewünschte Aktion ausgeführt</text:p>
                  </text:list-item>
                </text:list>
              </text:list-item>
            </text:list>
          </draw:text-box>
        </draw:frame>
        <draw:frame draw:style-name="gr4" draw:layer="layout" svg:width="21.453cm" svg:height="5.998cm" svg:x="3.274cm" svg:y="7.8cm">
          <draw:text-box>
            <text:p>1: let lambda = () =&gt; console.log("Hallo Welt!");<text:line-break/>2: window.setTimeout(lambda, 1000);<text:line-break/>3: console.log("Tschüss!");</text:p>
            <text:p/>
            <text:p text:style-name="P5">// Ausgabe:</text:p>
            <text:p text:style-name="P5">Tschüss!</text:p>
            <text:p>Hallo Welt!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Was wenn der Callback erst gesetzt wird, wenn die asynchrone Operation schon abgeschlossen ist?</text:p>
                    <text:p/>
                    <text:p/>
                    <text:p/>
                    <text:p/>
                    <text:p/>
                  </text:list-item>
                  <text:list-item>
                    <text:p>Ergebnis: Unser Code wird nie ausgeführt, weil wir ihn zu spät registrieren.</text:p>
                  </text:list-item>
                </text:list>
              </text:list-item>
            </text:list>
          </draw:text-box>
        </draw:frame>
        <draw:frame draw:style-name="gr5" draw:layer="layout" svg:width="24.446cm" svg:height="5.177cm" svg:x="1.786cm" svg:y="6.623cm">
          <draw:text-box>
            <text:p>// <text:span text:style-name="T4">Falsch</text:span>: Erst schicken, dann registrieren</text:p>
            <text:p>let xhr = new XMLHttpRequest();</text:p>
            <text:p>xhr.open("GET", "http://www.example.org/example.txt");</text:p>
            <text:p>xhr.send();</text:p>
            <text:p>// Zeit vergeht...</text:p>
            <text:p>xhr.addEventListener("load", () =&gt; console.log("Done"));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Erst den Callback setzen, dann den Request abschicken.</text:p>
                    <text:p/>
                    <text:p/>
                    <text:p/>
                    <text:p/>
                    <text:p/>
                  </text:list-item>
                  <text:list-item>
                    <text:p>Ergebnis: Wenn der Request abgeschlossen ist, wird unser Code ausgeführt.</text:p>
                  </text:list-item>
                </text:list>
              </text:list-item>
            </text:list>
          </draw:text-box>
        </draw:frame>
        <draw:frame draw:style-name="gr6" draw:layer="layout" svg:width="24.018cm" svg:height="4.356cm" svg:x="1.991cm" svg:y="6.323cm">
          <draw:text-box>
            <text:p>// <text:span text:style-name="T5">Richtig</text:span>: Erst registrieren, dann schicken</text:p>
            <text:p>let xhr = new XMLHttpRequest();</text:p>
            <text:p>xhr.addEventListener("load", () =&gt; console.log("Done");</text:p>
            <text:p>xhr.open("GET", "http://www.example.org/example.txt");</text:p>
            <text:p>xhr.send();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mises / Futures / Deferred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Promise kapselt eine asynchrone Operation</text:p>
              </text:list-item>
              <text:list-item>
                <text:p>Es liefert APIs um eigenen Code auszuführen wenn die asynchrone Operation:</text:p>
                <text:list>
                  <text:list-item>
                    <text:p>Erfolgreich war (<text:span text:style-name="T6">done</text:span>)</text:p>
                  </text:list-item>
                  <text:list-item>
                    <text:p>Nicht erfolgreich war (fail)</text:p>
                  </text:list-item>
                  <text:list-item>
                    <text:p>In Beiden fällen (any)</text:p>
                  </text:list-item>
                  <text:list-item>
                    <text:p>Eine Exception auftrat (catch)</text:p>
                  </text:list-item>
                </text:list>
              </text:list-item>
              <text:list-item>
                <text:p>Alle jQuery AJAX Funktionen liefern ein Promise</text:p>
              </text:list-item>
              <text:list-item>
                <text:p>jQuery Deferred Object:</text:p>
                <text:list>
                  <text:list-item>
                    <text:p>https://api.jquery.com/category/deferred-objec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Promises / Futures / Deferred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in Promise garantiert, dass auch dann der Callback aufgerufen wird, wenn man sich zu spät registriert!</text:p>
              </text:list-item>
            </text:list>
          </draw:text-box>
        </draw:frame>
        <draw:frame draw:style-name="gr7" draw:layer="layout" svg:width="18.46cm" svg:height="6.819cm" svg:x="4.77cm" svg:y="6cm">
          <draw:text-box>
            <text:p>let promise = $.get("index.html");</text:p>
            <text:p>// 10 Minuten später</text:p>
            <text:p>promise.done(() =&gt; console.log("Fertig"));</text:p>
            <text:p/>
            <text:p/>
            <text:p>// Ausgabe:<text:line-break/>Fertig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Nice to know: Closures!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nnerhalb von Lambdas werden alle lokalen Variablen aus dem umgebenden Scope kopiert</text:p>
              </text:list-item>
              <text:list-item>
                <text:p>Praktisch um später den „state“ zu tracken</text:p>
              </text:list-item>
            </text:list>
          </draw:text-box>
        </draw:frame>
        <draw:frame draw:style-name="gr8" draw:layer="layout" svg:width="27.406cm" svg:height="7.64cm" svg:x="0.297cm" svg:y="6.4cm">
          <draw:text-box>
            <text:p>function closureDemo() {</text:p>
            <text:p><text:tab/>let now = new Date().toString();</text:p>
            <text:p><text:tab/>let lambda = () =&gt; console.log("[Lambda] The Time: " + now);</text:p>
            <text:p><text:tab/>window.setTimeout(lambda, 2000);</text:p>
            <text:p><text:tab/>console.log("[Function] The Time: " + now);</text:p>
            <text:p>}</text:p>
            <text:p>// Ausgabe:<text:line-break/>[Function] The Time: Sun Apr 28 2019 19:00:57</text:p>
            <text:p>[Lambda] The Time: Sun Apr 28 2019 19:00:57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Fetch API für HTTP Request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achfolger von XMLHttpRequests (XHR)</text:p>
                <text:list>
                  <text:list-item>
                    <text:p>Ermöglicht das asynchrone verschicken und empfangen von HTTP-Requests</text:p>
                  </text:list-item>
                  <text:list-item>
                    <text:p>Ersetzt XHR in mordernen Browser<text:line-break/>https://caniuse.com/#feat=fetch</text:p>
                  </text:list-item>
                </text:list>
              </text:list-item>
              <text:list-item>
                <text:p>Vollständig asynchrone API basierend auf Promises</text:p>
              </text:list-item>
              <text:list-item>
                <text:p>Details:<text:line-break/><text:span text:style-name="T7">https://developer.mozilla.org/de/docs/Web/API/Fetch_A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Fetch Promises Beispiel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9" draw:text-style-name="P7" draw:layer="layout" svg:width="24.205cm" svg:height="11.306cm" svg:x="1.903cm" svg:y="2.6cm">
          <draw:text-box>
            <text:p><text:span text:style-name="T8">// 1) Response Body in Console loggen</text:span></text:p>
            <text:p><text:span text:style-name="T8">let promise = fetch("https://google.de/);</text:span></text:p>
            <text:p><text:span text:style-name="T8">promise.then((response) =&gt; console.log(response.text()));</text:span></text:p>
            <text:p><text:span text:style-name="T8"/></text:p>
            <text:p><text:span text:style-name="T8"/></text:p>
            <text:p><text:span text:style-name="T8"/></text:p>
            <text:p><text:span text:style-name="T8">// 2) JSON Extrahieren</text:span></text:p>
            <text:p><text:span text:style-name="T8">// data.json: [ { "name": "Guybrush" }, { "name": "Thomas" } ]</text:span></text:p>
            <text:p><text:span text:style-name="T8">let promise = fetch("http://some.api.de/data.json");</text:span></text:p>
            <text:p><text:span text:style-name="T8">promise.then((response) =&gt; {</text:span></text:p>
            <text:p><text:span text:style-name="T8"><text:tab/></text:span><text:span text:style-name="T8">return response.json();</text:span></text:p>
            <text:p><text:span text:style-name="T8">})</text:span></text:p>
            <text:p><text:span text:style-name="T8">.then((jsonData) =&gt; {</text:span></text:p>
            <text:p><text:span text:style-name="T8"><text:tab/></text:span><text:span text:style-name="T8">alert("Der Name ist: " + jsonData[0].name);</text:span></text:p>
            <text:p><text:span text:style-name="T8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Fetch async/await Beispie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/await ist „syntactical sugar“ um promises nicht manuell „auspacken“ zu müssen</text:p>
              </text:list-item>
              <text:list-item>
                <text:p>Durch async/await sieht asynchroner Code aus, wie sequentieller Code (ist aber weiterhin asynchron!)</text:p>
              </text:list-item>
            </text:list>
          </draw:text-box>
        </draw:frame>
        <draw:frame draw:style-name="gr10" draw:layer="layout" svg:width="27.011cm" svg:height="5.177cm" svg:x="0.2cm" svg:y="7.823cm">
          <draw:text-box>
            <text:p>// data.json: [ { "name": "Guybrush" }, { "name": "Thomas" } ]</text:p>
            <text:p><text:span text:style-name="T9">async</text:span> function getName() {</text:p>
            <text:p><text:tab/>let response = <text:span text:style-name="T9">await</text:span> fetch("http://some.api.de/data.json");</text:p>
            <text:p><text:span text:style-name="T10"><text:tab/></text:span><text:span text:style-name="T10">let jsonData = </text:span><text:span text:style-name="T9">await </text:span>response.json();</text:p>
            <text:p><text:tab/>alert("Der Name ist: " + jsonData[0].name)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Beispiel: „Todo-Client“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nbinden des „dynamischen HTML“-Clients an das RESTfull Backend</text:p>
              </text:list-item>
              <text:list-item>
                <text:p>Verwenden der fetch-API mit async-await</text:p>
              </text:list-item>
              <text:list-item>
                <text:p>Siehe im Repo unter:</text:p>
                <text:list>
                  <text:list-item>
                    <text:p text:style-name="P8">Beispiele/Node.JS/Todo-Back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Weiterführende Link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Gegenüberstellung Callbacks/Promises/AsyncAwait</text:p>
                <text:list>
                  <text:list-item>
                    <text:p text:style-name="P8">Beispiele/Node.JS/Asynchrone-Programmierung</text:p>
                  </text:list-item>
                </text:list>
              </text:list-item>
              <text:list-item>
                <text:p>Weiterführende Links für asynchrone Programmierung</text:p>
                <text:list>
                  <text:list-item>
                    <text:p><text:span text:style-name="T11">https://developer.mozilla.org/en-US/docs/Learn/JavaScript/Asynchronous</text:span></text:p>
                  </text:list-item>
                  <text:list-item>
                    <text:p><text:span text:style-name="T11">https://www.youtube.com/watch?v=PoRJizFvM7s</text:span></text:p>
                  </text:list-item>
                  <text:list-item>
                    <text:p><text:span text:style-name="T11">https://www.w3schools.com/js/js_callback.as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ideograph-alpha" style:punctuation-wrap="hanging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lef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lef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lef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lef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lef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lef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 loext:decorative="false"/>
    </style:style>
    <style:style style:name="Mpr3" style:family="presentation" style:parent-style-name="Midnightblue-title">
      <style:graphic-properties draw:auto-grow-height="false" fo:min-height="3.507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 loext:decorative="false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right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right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left" style:writing-mode="lr-tb"/>
    </style:style>
    <style:style style:name="MP7" style:family="paragraph">
      <loext:graphic-properties draw:fill="none"/>
      <style:paragraph-properties fo:text-align="left"/>
    </style:style>
    <style:style style:name="MP8" style:family="paragraph">
      <style:paragraph-properties fo:text-align="center" style:writing-mode="lr-tb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lef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right" style:writing-mode="lr-tb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right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paragraph-properties style:writing-mode="lr-tb"/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right" style:writing-mode="lr-tb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right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3-04T23:33:48.342800721</meta:creation-date>
    <meta:editing-duration>PT20H12M3S</meta:editing-duration>
    <meta:editing-cycles>306</meta:editing-cycles>
    <meta:generator>LibreOffice/26.2.2.2$Linux_X86_64 LibreOffice_project/b8d3d8168498fa6cc231901342a3b8d72dd2bb7e</meta:generator>
    <dc:title>Midnightblue</dc:title>
    <dc:date>2026-05-04T09:55:33.945530088</dc:date>
    <meta:document-statistic meta:object-count="130"/>
  </office:meta>
</office:document-meta>
</file>